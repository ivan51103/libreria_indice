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0.9" xmlns:svg="urn:oasis:names:tc:opendocument:xmlns:svg-compatible:1.0" office:version="1.2">
  <office:styles>
    <style:style style:name="T1" style:family="text">
      <style:text-properties fo:font-size="24pt" fo:font-weight="bold" fo:color="#000000"/>
    </style:style>
    <style:style style:name="T2" style:family="text">
      <style:text-properties fo:font-size="18pt" fo:font-weight="bold" fo:color="#1a1a2e"/>
    </style:style>
    <style:style style:name="T3" style:family="text">
      <style:text-properties fo:font-size="14pt" fo:font-weight="bold" fo:color="#333333"/>
    </style:style>
    <style:style style:name="TBold" style:family="text">
      <style:text-properties fo:font-weight="bold"/>
    </style:style>
    <style:style style:name="TBoldRed" style:family="text">
      <style:text-properties fo:font-weight="bold" fo:color="#cc0000"/>
    </style:style>
    <style:style style:name="TNormal" style:family="text">
      <style:text-properties fo:font-size="12pt"/>
    </style:style>
    <style:style style:name="TCode" style:family="text">
      <style:text-properties fo:font-family="Courier New" fo:font-size="10pt" fo:background-color="#f5f5f5"/>
    </style:style>
    <style:style style:name="P1" style:family="paragraph" style:parent-style-name="Standard">
      <style:paragraph-properties fo:margin-top="0.5cm" fo:margin-bottom="0.2cm"/>
      <style:text-properties fo:font-size="14pt" fo:font-weight="bold"/>
    </style:style>
    <style:style style:name="P2" style:family="paragraph" style:parent-style-name="Standard">
      <style:paragraph-properties fo:margin-top="0.3cm" fo:margin-bottom="0.15cm"/>
      <style:text-properties fo:font-size="12pt" fo:font-weight="bold"/>
    </style:style>
    <style:style style:name="PBody" style:family="paragraph" style:parent-style-name="Standard">
      <style:paragraph-properties fo:margin-top="0.15cm" fo:margin-bottom="0.15cm"/>
      <style:text-properties fo:font-size="12pt"/>
    </style:style>
    <style:style style:name="PCenter" style:family="paragraph" style:parent-style-name="Standard">
      <style:paragraph-properties text:align="center"/>
      <style:text-properties fo:font-size="28pt" fo:font-weight="bold" fo:color="#1a1a2e"/>
    </style:style>
    <style:style style:name="PCode" style:family="paragraph" style:parent-style-name="Standard">
      <style:paragraph-properties fo:margin-left="0.5cm"/>
      <style:text-properties fo:font-family="Courier New" fo:font-size="10pt" fo:background-color="#f5f5f5"/>
    </style:style>
  </office:styles>
  <office:body>
    <office:text>
      <text:p text:style-name="PCenter">Guía de Ejecución de Pruebas</text:p>
      <text:p text:style-name="PCenter"/>
      <text:p text:style-name="PBody"><text:span text:style-name="TBold">Módulo:</text:span> Registro de Libros (BookAdminView + InventoryService)</text:p>
      <text:p text:style-name="PBody"><text:span text:style-name="TBold">Proyecto:</text:span> Indice Digital Biblioteca</text:p>
      <text:p text:style-name="PBody"><text:span text:style-name="TBold">Tipo de guía:</text:span> Caja Negra, Caja Blanca y Caja Gris</text:p>
      <text:p text:style-name="PBody"><text:span text:style-name="TBold">Evaluador:</text:span> _________________________</text:p>
      <text:p text:style-name="PBody"><text:span text:style-name="TBold">Fecha:</text:span> _________________________</text:p>
      <text:p text:style-name="PBody"/>
      <!-- ===== CAJA NEGRA ===== -->
      <text:p text:style-name="P1">1. PRUEBA DE CAJA NEGRA (BLACK-BOX)</text:p>
      <text:p text:style-name="P2">Objetivo</text:p>
      <text:p text:style-name="PBody">Validar que el formulario de registro de un nuevo libro rechaza el envío cuando se omite el título y el autor, mostrando un mensaje de error visible en pantalla sin que la transacción persista datos parciales en la base de datos.</text:p>
      <text:p text:style-name="P2">Precondiciones</text:p>
      <text:p text:style-name="PBody">• La aplicación está ejecutándose y se ha iniciado sesión como administrador (usuario: <text:span text:style-name="TBold">admin</text:span>, contraseña: <text:span text:style-name="TBold">admin123</text:span>).</text:p>
      <text:p text:style-name="PBody">• El panel de administración es visible (botón "Registrar libro" habilitado).</text:p>
      <text:p text:style-name="PBody">• La base de datos contiene al menos un libro previo para verificar que no se corrompe.</text:p>
      <text:p text:style-name="P2">Datos de Entrada (Inputs)</text:p>
      <text:p text:style-name="PBody">• Título: (vacío)</text:p>
      <text:p text:style-name="PBody">• Autor: (vacío)</text:p>
      <text:p text:style-name="PBody">• ISBN: 999TEST-001</text:p>
      <text:p text:style-name="PBody">• Editorial: Editorial Prueba</text:p>
      <text:p text:style-name="PBody">• Año: 2026</text:p>
      <text:p text:style-name="PBody">• Categoría: Testing</text:p>
      <text:p text:style-name="PBody">• Carrera: SISTEMAS</text:p>
      <text:p text:style-name="PBody">• Código de inventario: INV-TEST-BLACK-001</text:p>
      <text:p text:style-name="PBody">• Código de ubicación: LOC-TEST-BLACK</text:p>
      <text:p text:style-name="P2">Pasos para la Ejecución</text:p>
      <text:p text:style-name="PBody">1. Hacer clic en el botón <text:span text:style-name="TBold">"Registrar libro"</text:span> en la barra superior de la ventana de catálogo.</text:p>
      <text:p text:style-name="PBody">2. En el diálogo modal que se abre, dejar los campos <text:span text:style-name="TBold">Título</text:span> y <text:span text:style-name="TBold">Autor</text:span> vacíos.</text:p>
      <text:p text:style-name="PBody">3. Completar únicamente los campos: ISBN, Editorial, Año, Categoría, Carrera, Código de inventario y Código de ubicación.</text:p>
      <text:p text:style-name="PBody">4. Hacer clic en el botón <text:span text:style-name="TBold">"Guardar"</text:span>.</text:p>
      <text:p text:style-name="PBody">5. Verificar que aparece un mensaje de error en la interfaz (Alert emergente).</text:p>
      <text:p text:style-name="PBody">6. Cerrar el diálogo manualmente si sigue abierto.</text:p>
      <text:p text:style-name="PBody">7. En la ventana principal de catálogo, realizar una búsqueda por el ISBN <text:span text:style-name="TCode">999TEST-001</text:span> para confirmar que el libro NO fue registrado.</text:p>
      <text:p text:style-name="P2">Resultado Esperado</text:p>
      <text:p text:style-name="PBody">✓ El sistema <text:span text:style-name="TBoldRed">no debe cerrar</text:span> el diálogo de registro.</text:p>
      <text:p text:style-name="PBody">✓ Debe mostrar un mensaje de error claro: <text:span text:style-name="TCode">"Titulo y autor son obligatorios."</text:span></text:p>
      <text:p text:style-name="PBody">✓ Al buscar por el ISBN <text:span text:style-name="TCode">999TEST-001</text:span> en el catálogo, no debe aparecer ningún resultado.</text:p>
      <text:p text:style-name="PBody">✓ Los datos preexistentes en la base de datos deben seguir accesibles normalmente.</text:p>
      <!-- ===== CAJA BLANCA ===== -->
      <text:p text:style-name="PBody"/>
      <text:p text:style-name="P1">2. PRUEBA DE CAJA BLANCA (WHITE-BOX)</text:p>
      <text:p text:style-name="P2">Objetivo</text:p>
      <text:p text:style-name="PBody">Verificar que el método <text:span text:style-name="TCode">registerBook</text:span> de <text:span text:style-name="TCode">InventoryService.java</text:span> ejecuta correctamente la ruta condicional de validación de unicidad de ISBN (<text:span text:style-name="TCode">validateUniqueBookTitle</text:span>) y fuerza el camino donde el ISBN ya existe en la base de datos, lanzando <text:span text:style-name="TCode">BusinessException</text:span> antes de llegar a la transacción de escritura.</text:p>
      <text:p text:style-name="P2">Requisitos Técnicos</text:p>
      <text:p text:style-name="PBody">• Acceso al código fuente del proyecto (rama main).</text:p>
      <text:p text:style-name="PBody">• Entorno de desarrollo con Maven para ejecutar pruebas unitarias (o depuración con breakpoints).</text:p>
      <text:p text:style-name="PBody">• Archivo a inspeccionar: <text:span text:style-name="TCode">src/main/java/com/biblioteca/service/InventoryService.java</text:span>, líneas 129–137 y 35–56.</text:p>
      <text:p text:style-name="P2">Flujo Lógico a Evaluar</text:p>
      <text:p text:style-name="PBody">1. El método <text:span text:style-name="TCode">registerBook</text:span> recibe un <text:span text:style-name="TCode">BookTitle</text:span> cuyo ISBN tiene el valor <text:span text:style-name="TCode">"999TEST-WB-002"</text:span>.</text:p>
      <text:p text:style-name="PBody">2. La validación <text:span text:style-name="TCode">validateUniqueBookTitle</text:span> ejecuta <text:span text:style-name="TCode">bookTitleRepository.findByIsbn(isbn.trim())</text:span>.</text:p>
      <text:p text:style-name="PBody">3. Si el ISBN <text:span text:style-name="TBold">no existe</text:span> en la BD → el método retorna null → el flujo continúa a la transacción.</text:p>
      <text:p text:style-name="PBody">4. Si el ISBN <text:span text:style-name="TBold">ya existe</text:span> en la BD → se lanza <text:span text:style-name="TCode">BusinessException("Ya existe otro libro registrado con ese ISBN.")</text:span>.</text:p>
      <text:p text:style-name="PBody">5. Se debe forzar el camino 4 (ISBN duplicado) registrando primero un libro con ISBN <text:span text:style-name="TCode">999TEST-WB-002</text:span> y luego intentando registrar otro con el mismo ISBN.</text:p>
      <text:p text:style-name="P2">Resultado Esperado</text:p>
      <text:p text:style-name="PBody">✓ <text:span text:style-name="TCode">BusinessException</text:span> se lanza <text:span text:style-name="TBoldRed">antes</text:span> de <text:span text:style-name="TCode">executeAtomicWrite</text:span>, por lo que no se abre ninguna conexión a la BD para escritura.</text:p>
      <text:p text:style-name="PBody">✓ La excepción contiene el mensaje exacto: <text:span text:style-name="TCode">"Ya existe otro libro registrado con ese ISBN."</text:span></text:p>
      <text:p text:style-name="PBody">✓ Después del lanzamiento, la base de datos permanece en el mismo estado que antes de la llamada a <text:span text:style-name="TCode">registerBook</text:span>.</text:p>
      <text:p text:style-name="PBody">✓ Para confirmar: ejecutar <text:span text:style-name="TCode">mvn test -Dtest=InventoryServiceTest</text:span> y verificar que el test correspondiente pasa.</text:p>
      <!-- ===== CAJA GRIS ===== -->
      <text:p text:style-name="PBody"/>
      <text:p text:style-name="P1">3. PRUEBA DE CAJA GRIS (GREY-BOX)</text:p>
      <text:p text:style-name="P2">Objetivo</text:p>
      <text:p text:style-name="PBody">Validar que al registrar un libro exitosamente desde la interfaz gráfica, los datos persisten correctamente en las tres tablas SQLite (<text:span text:style-name="TCode">book_titles</text:span>, <text:span text:style-name="TCode">locations</text:span>, <text:span text:style-name="TCode">book_copies</text:span>) y que el registro devuelto por el catálogo coincide exactamente con lo insertado.</text:p>
      <text:p text:style-name="P2">Conocimiento Interno Necesario</text:p>
      <text:p text:style-name="PBody">• Esquema de base de datos (<text:span text:style-name="TCode">DatabaseInitializer.java</text:span>): tablas book_titles, locations, book_copies con sus columnas y FK.</text:p>
      <text:p text:style-name="PBody">• El archivo de base de datos se encuentra en <text:span text:style-name="TCode">~/.biblioteca/biblioteca.db</text:span>.</text:p>
      <text:p text:style-name="PBody">• Se requiere acceso a la terminal para consultar SQLite con el comando <text:span text:style-name="TCode">sqlite3</text:span>.</text:p>
      <text:p text:style-name="P2">Datos de Entrada</text:p>
      <text:p text:style-name="PBody">• Título: "Prueba Integración Caja Gris"</text:p>
      <text:p text:style-name="PBody">• Autor: "Evaluador QA"</text:p>
      <text:p text:style-name="PBody">• ISBN: 999GREYBOX-003</text:p>
      <text:p text:style-name="PBody">• Editorial: "Testing Press"</text:p>
      <text:p text:style-name="PBody">• Año: 2026</text:p>
      <text:p text:style-name="PBody">• Categoría: "QA"</text:p>
      <text:p text:style-name="PBody">• Carrera: SISTEMAS</text:p>
      <text:p text:style-name="PBody">• Código de inventario: INV-GREY-003</text:p>
      <text:p text:style-name="PBody">• Código de ubicación: LOC-GREY-003</text:p>
      <text:p text:style-name="P2">Pasos para la Ejecución</text:p>
      <text:p text:style-name="PBody"><text:span text:style-name="TBold">Paso 1 — Interactuar con la interfaz funcional:</text:span></text:p>
      <text:p text:style-name="PBody">Desde la ventana de catálogo con sesión admin iniciada, hacer clic en <text:span text:style-name="TBold">"Registrar libro"</text:span> y completar el formulario con los datos de entrada. Los campos room y section dejarlos vacíos. Hacer clic en <text:span text:style-name="TBold">"Guardar"</text:span> y esperar el mensaje de confirmación.</text:p>
      <text:p text:style-name="PBody"><text:span text:style-name="TBold">Paso 2 — Verificar el backend:</text:span></text:p>
      <text:p text:style-name="PBody">Abrir una terminal y ejecutar:</text:p>
      <text:p text:style-name="PCode">sqlite3 ~/.biblioteca/biblioteca.db</text:p>
      <text:p text:style-name="PBody">Ejecutar las siguientes consultas:</text:p>
      <text:p text:style-name="PCode">SELECT id, title, author, isbn, publisher, year FROM book_titles WHERE isbn = '999GREYBOX-003';</text:p>
      <text:p text:style-name="PCode">SELECT id, code, room, section FROM locations WHERE code = 'LOC-GREY-003';</text:p>
      <text:p text:style-name="PCode">SELECT bc.id, bc.inventory_code, bc.status, bc.book_title_id, bc.location_id FROM book_copies bc WHERE bc.inventory_code = 'INV-GREY-003';</text:p>
      <text:p text:style-name="P2">Resultado Esperado</text:p>
      <text:p text:style-name="PBody">✓ La primera consulta devuelve <text:span text:style-name="TBold">exactamente una fila</text:span> con título <text:span text:style-name="TCode">"Prueba Integración Caja Gris"</text:span>, autor <text:span text:style-name="TCode">"Evaluador QA"</text:span>, ISBN <text:span text:style-name="TCode">999GREYBOX-003</text:span>, editorial <text:span text:style-name="TCode">"Testing Press"</text:span> y año <text:span text:style-name="TCode">2026</text:span>.</text:p>
      <text:p text:style-name="PBody">✓ La segunda consulta devuelve <text:span text:style-name="TBold">exactamente una fila</text:span> con código <text:span text:style-name="TCode">LOC-GREY-003</text:span> y los campos <text:span text:style-name="TCode">room</text:span> y <text:span text:style-name="TCode">section</text:span> con los valores por defecto <text:span text:style-name="TCode">"Sin especificar"</text:span>.</text:p>
      <text:p text:style-name="PBody">✓ La tercera consulta devuelve <text:span text:style-name="TBold">exactamente una fila</text:span> con <text:span text:style-name="TCode">inventory_code</text:span> = <text:span text:style-name="TCode">INV-GREY-003</text:span>, <text:span text:style-name="TCode">status</text:span> = <text:span text:style-name="TCode">AVAILABLE</text:span>, y los valores de <text:span text:style-name="TCode">book_title_id</text:span> y <text:span text:style-name="TCode">location_id</text:span> deben coincidir con los <text:span text:style-name="TCode">id</text:span> devueltos por las consultas 1 y 2 respectivamente.</text:p>
      <text:p text:style-name="PBody">✓ Opcional: desde la interfaz de catálogo, buscar por "Caja Gris" y verificar que aparece exactamente un libro con los datos ingresados.</text:p>
      <text:p text:style-name="PBody"/>
      <text:p text:style-name="PBody"/>
      <text:p text:style-name="PCenter">— Fin de la guía —</text:p>
    </office:text>
  </office:body>
</office:document-content>
</file>