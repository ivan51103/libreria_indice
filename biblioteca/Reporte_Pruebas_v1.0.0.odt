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office:font-face-decls>
  <office:automatic-styles>
    <style:style style:name="Table1" style:family="table">
      <style:table-properties style:width="7.8743in" table:align="left"/>
    </style:style>
    <style:style style:name="Table1.A" style:family="table-column">
      <style:table-column-properties style:column-width="1.2729in"/>
    </style:style>
    <style:style style:name="Table1.B" style:family="table-column">
      <style:table-column-properties style:column-width="6.6014in"/>
    </style:style>
    <style:style style:name="Table1.A1" style:family="table-cell">
      <style:table-cell-properties style:vertical-align="middle" fo:padding="0.0194in" fo:border="none"/>
    </style:style>
    <style:style style:name="Table2" style:family="table">
      <style:table-properties style:width="5.6097in" table:align="left"/>
    </style:style>
    <style:style style:name="Table2.A" style:family="table-column">
      <style:table-column-properties style:column-width="1.1361in"/>
    </style:style>
    <style:style style:name="Table2.B" style:family="table-column">
      <style:table-column-properties style:column-width="1.3292in"/>
    </style:style>
    <style:style style:name="Table2.C" style:family="table-column">
      <style:table-column-properties style:column-width="0.6813in"/>
    </style:style>
    <style:style style:name="Table2.D" style:family="table-column">
      <style:table-column-properties style:column-width="0.6243in"/>
    </style:style>
    <style:style style:name="Table2.E" style:family="table-column">
      <style:table-column-properties style:column-width="0.9076in"/>
    </style:style>
    <style:style style:name="Table2.F" style:family="table-column">
      <style:table-column-properties style:column-width="0.9313in"/>
    </style:style>
    <style:style style:name="Table2.A1" style:family="table-cell">
      <style:table-cell-properties style:vertical-align="middle" fo:padding="0.0194in" fo:border="none"/>
    </style:style>
    <style:style style:name="Table2.5" style:family="table-row">
      <style:table-row-properties fo:background-color="#e8e8e8">
        <style:background-image/>
      </style:table-row-properties>
    </style:style>
    <style:style style:name="P1" style:family="paragraph" style:parent-style-name="Heading_20_1" style:master-page-name="HTML">
      <style:paragraph-properties style:page-number="auto"/>
    </style:style>
    <style:style style:name="P2" style:family="paragraph" style:parent-style-name="Table_20_Heading">
      <style:paragraph-properties fo:margin-left="0in" fo:margin-right="0in" fo:text-indent="0in" style:auto-text-indent="false"/>
    </style:style>
    <style:style style:name="P3" style:family="paragraph" style:parent-style-name="Table_20_Contents">
      <style:text-properties fo:font-weight="bold"/>
    </style:style>
    <style:style style:name="P4" style:family="paragraph" style:parent-style-name="Text_20_body" style:list-style-name="L1">
      <style:paragraph-properties fo:margin-top="0.0626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0626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0626in" fo:margin-bottom="0in"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paragraph-properties fo:margin-top="0.0626in" fo:margin-bottom="0in" style:contextual-spacing="false"/>
    </style:style>
    <style:style style:name="P12" style:family="paragraph" style:parent-style-name="Text_20_body" style:list-style-name="L5"/>
    <style:style style:name="P13" style:family="paragraph" style:parent-style-name="Text_20_body">
      <style:text-properties fo:font-weight="bold"/>
    </style:style>
    <style:style style:name="P14" style:family="paragraph" style:parent-style-name="Text_20_body" style:list-style-name="L6">
      <style:paragraph-properties fo:margin-top="0.0626in" fo:margin-bottom="0in" style:contextual-spacing="false"/>
    </style:style>
    <style:style style:name="P15" style:family="paragraph" style:parent-style-name="Text_20_body" style:list-style-name="L6"/>
    <style:style style:name="T1" style:family="text">
      <style:text-properties fo:font-weight="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e de Pruebas — Indice Digital Biblioteca</text:p>
      <table:table table:name="Table1" table:style-name="Table1">
        <table:table-column table:style-name="Table1.A"/>
        <table:table-column table:style-name="Table1.B"/>
        <table:table-row>
          <table:table-cell table:style-name="Table1.A1" office:value-type="string">
            <text:p text:style-name="P2">Campo</text:p>
          </table:table-cell>
          <table:table-cell table:style-name="Table1.A1" office:value-type="string">
            <text:p text:style-name="Table_20_Heading">Valor</text:p>
          </table:table-cell>
        </table:table-row>
        <table:table-row>
          <table:table-cell table:style-name="Table1.A1" office:value-type="string">
            <text:p text:style-name="P3">Proyecto</text:p>
          </table:table-cell>
          <table:table-cell table:style-name="Table1.A1" office:value-type="string">
            <text:p text:style-name="Table_20_Contents">Indice Digital Biblioteca — Sistema de catálogo bibliotecario con interfaz gráfica JavaFX</text:p>
          </table:table-cell>
        </table:table-row>
        <table:table-row>
          <table:table-cell table:style-name="Table1.A1" office:value-type="string">
            <text:p text:style-name="P3">Versión evaluada</text:p>
          </table:table-cell>
          <table:table-cell table:style-name="Table1.A1" office:value-type="string">
            <text:p text:style-name="Table_20_Contents">1.0.0-SNAPSHOT (commit 929eb35)</text:p>
          </table:table-cell>
        </table:table-row>
        <table:table-row>
          <table:table-cell table:style-name="Table1.A1" office:value-type="string">
            <text:p text:style-name="P3">Fecha de ejecución</text:p>
          </table:table-cell>
          <table:table-cell table:style-name="Table1.A1" office:value-type="string">
            <text:p text:style-name="Table_20_Contents">2026-06-19</text:p>
          </table:table-cell>
        </table:table-row>
        <table:table-row>
          <table:table-cell table:style-name="Table1.A1" office:value-type="string">
            <text:p text:style-name="P3">Entorno de pruebas</text:p>
          </table:table-cell>
          <table:table-cell table:style-name="Table1.A1" office:value-type="string">
            <text:p text:style-name="Table_20_Contents">Linux Debian 13 (x86_64) — OpenJDK 21.0.11, JavaFX 21.0.10, SQLite 3.46.1 vía Maven 3.9</text:p>
          </table:table-cell>
        </table:table-row>
        <table:table-row>
          <table:table-cell table:style-name="Table1.A1" office:value-type="string">
            <text:p text:style-name="P3">Alcance</text:p>
          </table:table-cell>
          <table:table-cell table:style-name="Table1.A1" office:value-type="string">
            <text:p text:style-name="Table_20_Contents">Smoke Testing, Sanity Testing, Regression Testing sobre capa de persistencia, servicios de negocio, seguridad y empaquetado nativo</text:p>
          </table:table-cell>
        </table:table-row>
        <table:table-row>
          <table:table-cell table:style-name="Table1.A1" office:value-type="string">
            <text:p text:style-name="P3">Elaborado por</text:p>
          </table:table-cell>
          <table:table-cell table:style-name="Table1.A1" office:value-type="string">
            <text:p text:style-name="Table_20_Contents">Equipo de desarrollo (QA integrado)</text:p>
          </table:table-cell>
        </table:table-row>
      </table:table>
      <text:h text:style-name="Heading_20_2" text:outline-level="2">Resumen Ejecutivo</text:h>
      <text:p text:style-name="Quotations"><text:span text:style-name="T1">Estado Global: APROBADO</text:span> — He ejecutado la totalidad de las pruebas planificadas para el build 1.0.0-SNAPSHOT de Indice Digital Biblioteca. Las tres capas de verificación (smoke, sanidad y regresión) se completaron con un 100% de casos exitosos. El sistema compila correctamente en modo módulo JPMS, genera un runtime image recortado de 84 MB, produce el instalador .deb sin errores, y las 34 pruebas unitarias y de integración pasan sin fallos. No se reportan defectos de severidad Alta. El build es estable para su distribució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Tipo de Prueba</text:p>
          </table:table-cell>
          <table:table-cell table:style-name="Table2.A1" office:value-type="string">
            <text:p text:style-name="Table_20_Heading">Casos Ejecutados</text:p>
          </table:table-cell>
          <table:table-cell table:style-name="Table2.A1" office:value-type="string">
            <text:p text:style-name="Table_20_Heading">Exitosos</text:p>
          </table:table-cell>
          <table:table-cell table:style-name="Table2.A1" office:value-type="string">
            <text:p text:style-name="Table_20_Heading">Fallidos</text:p>
          </table:table-cell>
          <table:table-cell table:style-name="Table2.A1" office:value-type="string">
            <text:p text:style-name="Table_20_Heading">Bloqueados</text:p>
          </table:table-cell>
          <table:table-cell table:style-name="Table2.A1" office:value-type="string">
            <text:p text:style-name="Table_20_Heading">Estado</text:p>
          </table:table-cell>
        </table:table-row>
        <table:table-row>
          <table:table-cell table:style-name="Table2.A1" office:value-type="string">
            <text:p text:style-name="Table_20_Contents">Smoke</text:p>
          </table:table-cell>
          <table:table-cell table:style-name="Table2.A1" office:value-type="string">
            <text:p text:style-name="Table_20_Contents">6</text:p>
          </table:table-cell>
          <table:table-cell table:style-name="Table2.A1" office:value-type="string">
            <text:p text:style-name="Table_20_Contents">6</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APROBADO</text:p>
          </table:table-cell>
        </table:table-row>
        <table:table-row>
          <table:table-cell table:style-name="Table2.A1" office:value-type="string">
            <text:p text:style-name="Table_20_Contents">Sanidad</text:p>
          </table:table-cell>
          <table:table-cell table:style-name="Table2.A1" office:value-type="string">
            <text:p text:style-name="Table_20_Contents">26</text:p>
          </table:table-cell>
          <table:table-cell table:style-name="Table2.A1" office:value-type="string">
            <text:p text:style-name="Table_20_Contents">26</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APROBADO</text:p>
          </table:table-cell>
        </table:table-row>
        <table:table-row>
          <table:table-cell table:style-name="Table2.A1" office:value-type="string">
            <text:p text:style-name="Table_20_Contents">Regresión</text:p>
          </table:table-cell>
          <table:table-cell table:style-name="Table2.A1" office:value-type="string">
            <text:p text:style-name="Table_20_Contents">8</text:p>
          </table:table-cell>
          <table:table-cell table:style-name="Table2.A1" office:value-type="string">
            <text:p text:style-name="Table_20_Contents">8</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APROBADO</text:p>
          </table:table-cell>
        </table:table-row>
        <table:table-row table:style-name="Table2.5">
          <table:table-cell table:style-name="Table2.A1" office:value-type="string">
            <text:p text:style-name="Table_20_Contents">Total</text:p>
          </table:table-cell>
          <table:table-cell table:style-name="Table2.A1" office:value-type="string">
            <text:p text:style-name="Table_20_Contents">40</text:p>
          </table:table-cell>
          <table:table-cell table:style-name="Table2.A1" office:value-type="string">
            <text:p text:style-name="Table_20_Contents">40</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APROBADO</text:p>
          </table:table-cell>
        </table:table-row>
      </table:table>
      <text:h text:style-name="Heading_20_2" text:outline-level="2">Detalle de Ejecución por Fase</text:h>
      <text:h text:style-name="Heading_20_3" text:outline-level="3">1. Smoke Testing</text:h>
      <text:p text:style-name="Text_20_body"><text:span text:style-name="T1">Objetivo.</text:span> Verificar que el artefacto compila, los módulos JPMS se resuelven correctamente, el runtime image se genera sin errores y el instalador .deb se produce exitosamente.</text:p>
      <text:p text:style-name="Text_20_body"><text:span text:style-name="T1">Resultado.</text:span> Aprobado. Las 6 verificaciones de humo arrojaron los siguientes resultados:</text:p>
      <text:list text:style-name="L1">
        <text:list-item>
          <text:p text:style-name="P4">Compilación exitosa de 47 archivos fuente con <text:span text:style-name="Source_20_Text">javac --release 17 --module-path</text:span>. Sin errores ni warnings de compilación. </text:p>
        </text:list-item>
        <text:list-item>
          <text:p text:style-name="P4">Descriptor <text:span text:style-name="Source_20_Text">module-info.java</text:span> válido. Exporta los paquetes <text:span text:style-name="Source_20_Text">com.biblioteca.app</text:span>, <text:span text:style-name="Source_20_Text">com.biblioteca.ui.view</text:span> y <text:span text:style-name="Source_20_Text">com.biblioteca.util</text:span>. Declara dependencias modulares sobre <text:span text:style-name="Source_20_Text">javafx.controls</text:span>, <text:span text:style-name="Source_20_Text">java.sql</text:span> y <text:span text:style-name="Source_20_Text">org.xerial.sqlitejdbc</text:span>. </text:p>
        </text:list-item>
        <text:list-item>
          <text:p text:style-name="P4"><text:span text:style-name="Source_20_Text">mvn clean test</text:span> ejecuta 34 pruebas sin fallos ni errores. </text:p>
        </text:list-item>
        <text:list-item>
          <text:p text:style-name="P4"><text:span text:style-name="Source_20_Text">jlink</text:span> genera un runtime image recortado de 84 MB sin errores de resolución de módulos. </text:p>
        </text:list-item>
        <text:list-item>
          <text:p text:style-name="P4"><text:span text:style-name="Source_20_Text">jpackage --type deb</text:span> produce el instalador .deb de 87 MB exitosamente. </text:p>
        </text:list-item>
        <text:list-item>
          <text:p text:style-name="P5">Maven copia 36 recursos estáticos (33 portadas + 3 archivos de configuración y CSS) a <text:span text:style-name="Source_20_Text">target/classes</text:span> sin errores. </text:p>
        </text:list-item>
      </text:list>
      <text:h text:style-name="Heading_20_3" text:outline-level="3">2. Sanity Testing</text:h>
      <text:p text:style-name="Text_20_body"><text:span text:style-name="T1">Objetivo.</text:span> Validar que las capas de servicio, seguridad y persistencia implementadas en este ciclo funcionan correctamente de forma aislada.</text:p>
      <text:p text:style-name="Text_20_body"><text:span text:style-name="T1">Resultado.</text:span> Aprobado. Las 26 pruebas de sanidad se distribuyen de la siguiente manera:</text:p>
      <text:list text:style-name="L2">
        <text:list-item>
          <text:p text:style-name="P6"><text:span text:style-name="T1">Seguridad (8 casos).</text:span> PasswordService implementa PBKDF2 con 65,536 iteraciones de derivación. Se verifica generación de hash, coincidencia correcta, detección de contraseñas sin hash y rechazo de valores nulos. AuthenticationService valida credenciales correctas e incorrectas, y genera sesiones de invitado. AuthorizationService distingue correctamente entre roles ADMIN y GUEST. </text:p>
        </text:list-item>
        <text:list-item>
          <text:p text:style-name="P6"><text:span text:style-name="T1">Servicio de Catálogo (9 casos).</text:span> CatalogService soporta búsqueda textual con normalización Unicode (NFD) que elimina acentos y diacríticos. Filtra por carrera, ordena ascendente y descendentemente, pagina resultados, y maneja correctamente casos vacíos y valores nulos. </text:p>
        </text:list-item>
        <text:list-item>
          <text:p text:style-name="P6"><text:span text:style-name="T1">Servicio de Inventario (5 casos).</text:span> InventoryService coordina el registro transaccional de libro, ejemplar y ubicación. Valida unicidad de ISBN, código de inventario y código de ubicación. Rechaza datos nulos o vacíos con BusinessException. </text:p>
        </text:list-item>
        <text:list-item>
          <text:p text:style-name="P6"><text:span text:style-name="T1">Repositorio SQLite (5 casos).</text:span> SQLiteBookTitleRepository, SQLiteBookCopyRepository y SQLiteLocationRepository persisten y actualizan correctamente sus entidades. Soportan búsqueda por criterios combinados (texto + carrera), eliminación física, y consulta de carreras disponibles. </text:p>
        </text:list-item>
        <text:list-item>
          <text:p text:style-name="P7"><text:span text:style-name="T1">Repositorio de Usuarios (3 casos).</text:span> SQLiteUserRepository persiste usuarios con contraseñas hasheadas, permite búsqueda por nombre de usuario y actualización de datos. </text:p>
        </text:list-item>
      </text:list>
      <text:h text:style-name="Heading_20_3" text:outline-level="3">3. Regression Testing</text:h>
      <text:p text:style-name="Text_20_body"><text:span text:style-name="T1">Objetivo.</text:span> Ejecutar la suite de integración y verificar que los cambios introducidos en este ciclo — CoverResolver, module-info.java, actualización de seed data con 44 libros, migración de filtros de búsqueda — no hayan afectado la funcionalidad existente.</text:p>
      <text:p text:style-name="Text_20_body"><text:span text:style-name="T1">Resultado.</text:span> Aprobado. Las 8 pruebas de regresión incluyen:</text:p>
      <text:list text:style-name="L3">
        <text:list-item>
          <text:p text:style-name="P8"><text:span text:style-name="T1">Integración SQLite (4 casos).</text:span> Se verifican flujos completos de registro que involucran los tres repositorios (BookTitle, Location, BookCopy) dentro de una misma transacción. Se prueba la consistencia de datos ante operaciones concurrentes y el rollback completo cuando falla la escritura de un BookCopy. </text:p>
        </text:list-item>
        <text:list-item>
          <text:p text:style-name="P9"><text:span text:style-name="T1">Pruebas heredadas corregidas (4 casos).</text:span> Validación de la migración de la API de <text:span text:style-name="Source_20_Text">BookSearchCriteria</text:span> (los filtros individuales <text:span text:style-name="Source_20_Text">setAuthor</text:span>, <text:span text:style-name="Source_20_Text">setCategory</text:span>, <text:span text:style-name="Source_20_Text">setCareer</text:span> fueron reemplazados por <text:span text:style-name="Source_20_Text">setCareers(Set&lt;String&gt;)</text:span>). Se verifican los nuevos constructores de <text:span text:style-name="Source_20_Text">InventoryService</text:span> (con <text:span text:style-name="Source_20_Text">ConnectionProvider</text:span> para transacciones) y <text:span text:style-name="Source_20_Text">CatalogService</text:span> (sin dependencia de <text:span text:style-name="Source_20_Text">SearchService</text:span>). Se confirma el uso de <text:span text:style-name="Source_20_Text">CopyStatus.MISSING</text:span> en lugar del eliminado <text:span text:style-name="Source_20_Text">CopyStatus.REPAIR</text:span>. </text:p>
        </text:list-item>
      </text:list>
      <text:h text:style-name="Heading_20_2" text:outline-level="2">Registro de Defectos</text:h>
      <text:list text:style-name="L4">
        <text:list-item>
          <text:p text:style-name="P10"><text:span text:style-name="T1">BUG-001 | Severidad: Media | Módulo: CoverResolver.</text:span> El bloque <text:span text:style-name="Source_20_Text">catch (IOException e) {}</text:span> en el método <text:span text:style-name="Source_20_Text">extractFromResources</text:span> (CoverResolver.java, línea 44) suprime silenciosamente cualquier excepción de entrada/salida durante la extracción de portadas desde el classpath. Si el recurso no puede copiarse al directorio de datos del usuario (<text:span text:style-name="Source_20_Text">~/.biblioteca/covers/</text:span>), el sistema no notifica al usuario ni registra el error.</text:p>
          <text:p text:style-name="P10"><text:span text:style-name="T1">Recomendación.</text:span> Incorporar un mecanismo de registro, ya sea mediante <text:span text:style-name="Source_20_Text">java.util.logging</text:span> o SLF4J (ya presente en las dependencias del proyecto), para capturar la excepción. Alternativamente, propagar una advertencia hacia la interfaz de usuario para informar que la portada no pudo cargarse.</text:p>
        </text:list-item>
        <text:list-item>
          <text:p text:style-name="P10"><text:span text:style-name="T1">BUG-002 | Severidad: Baja | Módulo: CatalogService.</text:span> El método <text:span text:style-name="Source_20_Text">loadMatchingTitles</text:span> emplea un tamaño de página fijo de 10,000 registros (<text:span text:style-name="Source_20_Text">fullRequest.setSize(10_000)</text:span>) para recuperar todos los resultados del repositorio en memoria antes de aplicar paginación. Aunque este valor es suficiente para el volumen actual de datos (~44 libros), la estrategia no escala y derrota el propósito de la paginación a nivel de base de datos.</text:p>
          <text:p text:style-name="P10"><text:span text:style-name="T1">Recomendación.</text:span> Migrar la paginación a la capa de persistencia utilizando cláusulas SQL <text:span text:style-name="Source_20_Text">LIMIT</text:span> y <text:span text:style-name="Source_20_Text">OFFSET</text:span> nativas en los repositorios SQLite.</text:p>
        </text:list-item>
        <text:list-item>
          <text:p text:style-name="P10"><text:span text:style-name="T1">BUG-003 | Severidad: Baja | Módulo: ConnectionProvider.</text:span> El método <text:span text:style-name="Source_20_Text">rollbackQuietly</text:span> silencia <text:span text:style-name="Source_20_Text">SQLException</text:span> sin ningún tipo de registro. Si bien es una práctica aceptable para operaciones de limpieza, en entornos productivos se prefiere registrar la excepción a nivel DEBUG para facilitar el diagnóstico de problemas de conectividad.</text:p>
          <text:p text:style-name="P10"><text:span text:style-name="T1">Recomendación.</text:span> Agregar una sentencia de logging de nivel FINE o DEBUG en el bloque catch de <text:span text:style-name="Source_20_Text">rollbackQuietly</text:span>.</text:p>
        </text:list-item>
      </text:list>
      <text:h text:style-name="Heading_20_2" text:outline-level="2">Observaciones de Calidad de Código</text:h>
      <text:p text:style-name="Text_20_body">Durante la inspección del código fuente, identifiqué los siguientes puntos que, sin ser defectos funcionales, representan deuda técnica a considerar:</text:p>
      <text:list text:style-name="L5">
        <text:list-item>
          <text:p text:style-name="P11"><text:span text:style-name="T1">Cobertura de pruebas de interfaz gráfica.</text:span> Las vistas JavaFX (CatalogView con 1,119 líneas, BookAdminView con 443 líneas, LoginView con 126 líneas) no cuentan con ninguna prueba automatizada. CatalogView concentra una cantidad significativa de lógica de presentación y orquestación. Se recomienda integrar TestFX para cubrir esta capa. </text:p>
        </text:list-item>
        <text:list-item>
          <text:p text:style-name="P11"><text:span text:style-name="T1">Servicio duplicado.</text:span> Existen dos clases con responsabilidades similares: <text:span text:style-name="Source_20_Text">CatalogService</text:span> (144 líneas) y <text:span text:style-name="Source_20_Text">BookCatalogService</text:span> (63 líneas). Ambas realizan operaciones de catálogo pero con APIs distintas. Sería conveniente unificarlas o eliminar la no utilizada. </text:p>
        </text:list-item>
        <text:list-item>
          <text:p text:style-name="P11"><text:span text:style-name="T1">Archivos de prueba duplicados.</text:span> El directorio <text:span text:style-name="Source_20_Text">src/test-fixed/java</text:span> contiene versiones corregidas de pruebas que también existen en <text:span text:style-name="Source_20_Text">src/test/java</text:span>. El archivo <text:span text:style-name="Source_20_Text">pom.xml</text:span> debe excluir explícitamente las versiones antiguas mediante <text:span text:style-name="Source_20_Text">testExcludes</text:span>. Esto añade complejidad innecesaria al modelo de compilación. </text:p>
        </text:list-item>
        <text:list-item>
          <text:p text:style-name="P12"><text:span text:style-name="T1">Constantes de carrera duplicadas.</text:span> El mapa <text:span text:style-name="Source_20_Text">CAREER_ABBREVIATIONS</text:span> está definido tanto en <text:span text:style-name="Source_20_Text">CatalogView.java</text:span> (línea 115) como en <text:span text:style-name="Source_20_Text">BookAdminView.java</text:span> (línea 45) con exactamente los mismos valores. Se recomienda centralizar estas constantes en un solo lugar, idealmente en <text:span text:style-name="Source_20_Text">DesignTokens.java</text:span> o una clase <text:span text:style-name="Source_20_Text">Constants</text:span> dedicada. </text:p>
        </text:list-item>
      </text:list>
      <text:h text:style-name="Heading_20_2" text:outline-level="2">Conclusión y Recomendaciones</text:h>
      <text:p text:style-name="Text_20_body">El build 1.0.0-SNAPSHOT de Indice Digital Biblioteca cumple satisfactoriamente con los criterios de aceptación establecidos para las tres capas de prueba. Los 40 casos ejecutados (34 unitarios + 6 de infraestructura) resultaron exitosos. La compilación en modo módulo JPMS, el recorte del runtime con jlink y la generación del instalador .deb funcionan correctamente. El sistema es funcionalmente estable y está listo para su distribución.</text:p>
      <text:p text:style-name="P13">Recomendaciones para los próximos ciclos:</text:p>
      <text:list text:style-name="L6">
        <text:list-item>
          <text:p text:style-name="P14"><text:span text:style-name="T1">Automatizar pruebas de interfaz gráfica.</text:span> Incorporar TestFX para cubrir las vistas CatalogView, LoginView y BookAdminView. La vista de catálogo (1,119 líneas) es candidata prioritaria para refactorización y cobertura. </text:p>
        </text:list-item>
        <text:list-item>
          <text:p text:style-name="P14"><text:span text:style-name="T1">Agregar pruebas unitarias para CoverResolver.</text:span> El componente de extracción de portadas carece de pruebas. Se sugiere implementar tests parametrizados con <text:span text:style-name="Source_20_Text">@TempDir</text:span> que validen extracción desde classpath, caché en disco y manejo de archivos inexistentes. </text:p>
        </text:list-item>
        <text:list-item>
          <text:p text:style-name="P14"><text:span text:style-name="T1">Validar el pipeline en Windows.</text:span> El comando <text:span text:style-name="Source_20_Text">jpackage --type exe</text:span> requiere verificación en un entorno Windows con WiX Toolset v3.14 instalado. La generación del instalador .exe es el único paso del pipeline que no pudo validarse en este ciclo por limitaciones del entorno Linux. </text:p>
        </text:list-item>
        <text:list-item>
          <text:p text:style-name="P14"><text:span text:style-name="T1">Evaluar rendimiento del catálogo.</text:span> Realizar una prueba de carga simulando 500+ libros para verificar que los tiempos de respuesta de <text:span text:style-name="Source_20_Text">loadCatalog</text:span> se mantienen aceptables y que la paginación en memoria no degrada la experiencia de usuario. </text:p>
        </text:list-item>
        <text:list-item>
          <text:p text:style-name="P15"><text:span text:style-name="T1">Unificar constantes y servicios duplicados.</text:span> Centralizar <text:span text:style-name="Source_20_Text">CAREER_ABBREVIATIONS</text:span> en una clase compartida y evaluar la eliminación de <text:span text:style-name="Source_20_Text">BookCatalogService</text:span> si no tiene uso productiv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Free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Free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Liberation Sans1" fo:font-family="'Liberation Sans', Arial, sans-serif" fo:font-size="11pt" style:font-name-asian="Liberation Sans1" style:font-family-asian="'Liberation Sans', Arial, sans-serif" style:font-size-asian="11pt" style:font-name-complex="Liberation Sans1" style:font-family-complex="'Liberation Sans',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text-properties fo:font-size="10.5pt" style:font-size-asian="10.5pt" style:font-size-complex="10.5pt"/>
    </style:style>
    <style:style style:name="Heading_20_1" style:display-name="Heading 1" style:family="paragraph" style:parent-style-name="Heading" style:next-style-name="Text_20_body" style:class="chapter">
      <style:paragraph-properties fo:margin-top="0.1665in" fo:margin-bottom="0.1665in" style:contextual-spacing="false" fo:padding-left="0in" fo:padding-right="0in" fo:padding-top="0in" fo:padding-bottom="0.0835in" fo:border-left="none" fo:border-right="none" fo:border-top="none" fo:border-bottom="1.5pt solid #000000"/>
      <style:text-properties fo:color="#000000" loext:opacity="100%" fo:font-size="20pt" fo:font-weight="bold" style:font-size-asian="20pt" style:font-weight-asian="bold"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 style:font-family-complex="FreeSans" style:font-family-generic-complex="swiss"/>
    </style:style>
    <style:style style:name="Text_20_body" style:display-name="Text body" style:family="paragraph" style:parent-style-name="Standard" style:class="text">
      <style:paragraph-properties fo:margin-top="0.0626in" fo:margin-bottom="0.0626in" style:contextual-spacing="false" fo:line-height="130%"/>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2917in" fo:margin-bottom="0.1043in" style:contextual-spacing="false"/>
      <style:text-properties fo:color="#000000" loext:opacity="100%" style:font-name="Liberation Serif" fo:font-family="'Liberation Serif'" style:font-family-generic="roman" style:font-pitch="variable" fo:font-size="15pt" fo:font-weight="bold" style:font-name-asian="DejaVu Sans" style:font-family-asian="'DejaVu Sans'" style:font-family-generic-asian="system" style:font-pitch-asian="variable" style:font-size-asian="15pt" style:font-weight-asian="bold" style:font-name-complex="FreeSans1" style:font-family-complex="FreeSans" style:font-family-generic-complex="system" style:font-pitch-complex="variable" style:font-size-complex="15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083in" fo:margin-bottom="0.0835in" style:contextual-spacing="false"/>
      <style:text-properties fo:color="#000000" loext:opacity="10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1252in" fo:margin-right="0.1252in" fo:margin-top="0.1252in" fo:margin-bottom="0.1252in" style:contextual-spacing="false" fo:text-indent="0in" style:auto-text-indent="false" fo:padding-left="0.1665in" fo:padding-right="0in" fo:padding-top="0in" fo:padding-bottom="0in" fo:border-left="3pt solid #000000" fo:border-right="none" fo:border-top="none" fo:border-bottom="none"/>
      <style:text-properties fo:font-size="10.5pt" style:font-size-asian="10.5pt" style:font-size-complex="10.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0.5pt" fo:font-weight="bold" style:font-size-asian="10.5pt" style:font-weight-asian="bold" style:font-size-complex="10.5pt"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2" meta:image-count="0" meta:object-count="0" meta:page-count="1" meta:paragraph-count="91" meta:word-count="1354" meta:character-count="9648" meta:non-whitespace-character-count="8386"/>
    <meta:generator>LibreOffice/25.2.3.2$Linux_X86_64 LibreOffice_project/520$Build-2</meta:generator>
    <meta:user-defined meta:name=""/>
  </office:meta>
</office:document-meta>
</file>